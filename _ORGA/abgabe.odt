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f3a7"/>
    </style:style>
    <style:style style:name="P2" style:family="paragraph" style:parent-style-name="Text_20_body">
      <style:text-properties officeooo:paragraph-rsid="001c62df"/>
    </style:style>
    <style:style style:name="P3" style:family="paragraph" style:parent-style-name="Heading_20_2">
      <style:text-properties officeooo:paragraph-rsid="001c62df"/>
    </style:style>
    <style:style style:name="T1" style:family="text">
      <style:text-properties fo:font-weight="bold" officeooo:rsid="001c62df" style:font-weight-asian="bold" style:font-weight-complex="bold"/>
    </style:style>
    <style:style style:name="T2" style:family="text">
      <style:text-properties fo:font-weight="bold" officeooo:rsid="0017f3a7" style:font-weight-asian="bold" style:font-weight-complex="bold"/>
    </style:style>
    <style:style style:name="T3" style:family="text">
      <style:text-properties officeooo:rsid="0017f3a7"/>
    </style:style>
    <style:style style:name="T4" style:family="text">
      <style:text-properties officeooo:rsid="0019f733"/>
    </style:style>
    <style:style style:name="T5" style:family="text">
      <style:text-properties fo:font-weight="bold" officeooo:rsid="001dc9bc" style:font-weight-asian="bold" style:font-weight-complex="bold"/>
    </style:style>
    <style:style style:name="T6" style:family="text">
      <style:text-properties officeooo:rsid="001c62df"/>
    </style:style>
    <style:style style:name="T7" style:family="text">
      <style:text-properties fo:font-weight="bold" officeooo:rsid="001f94e6" style:font-weight-asian="bold" style:font-weight-complex="bold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Abgabe</text:span><text:span text:style-name="T2">:</text:span><text:span text:style-name="T3"> ______ <text:s text:c="40"/><text:tab/><text:tab/><text:tab/> <text:s text:c="5"/></text:span><text:span text:style-name="T2">Datum: </text:span><text:span text:style-name="T3">_____________________</text:span></text:p>
      <text:p text:style-name="P1"/>
      <text:p text:style-name="P1"><text:span text:style-name="T1">Spieltitel</text:span><text:span text:style-name="T2">:</text:span><text:span text:style-name="T3"> __________________________________________</text:span><text:span text:style-name="T4">_______</text:span><text:span text:style-name="T3">___________________</text:span></text:p>
      <text:h text:style-name="Heading_20_2" text:outline-level="2" text:is-list-header="true"/>
      <text:p text:style-name="Text_20_body"/>
      <text:p text:style-name="P2"><text:span text:style-name="T1">Website </text:span><text:span text:style-name="T5">(z.B. itch.io-Page)</text:span><text:span text:style-name="T2">:</text:span><text:span text:style-name="T3"> ________________________</text:span><text:span text:style-name="T4">______</text:span><text:span text:style-name="T6">___</text:span><text:span text:style-name="T4">_</text:span><text:span text:style-name="T3">___________________</text:span></text:p>
      <text:h text:style-name="P3" text:outline-level="2" text:is-list-header="true"/>
      <text:p text:style-name="P2"/>
      <text:p text:style-name="P2"><text:span text:style-name="T5">Source-Code (Gitlab/GitHub)</text:span><text:span text:style-name="T2">:</text:span><text:span text:style-name="T3"> _____________________________</text:span><text:span text:style-name="T4">_______</text:span><text:span text:style-name="T3">_______________</text:span></text:p>
      <text:p text:style-name="P2"/>
      <text:p text:style-name="P2"/>
      <text:p text:style-name="P2"><text:span text:style-name="T1">Team (Name, Vorname, Matrikel-Nr., </text:span><text:span text:style-name="T7">Itch.io Username</text:span><text:span text:style-name="T1">)</text:span><text:span text:style-name="T2">:</text:span><text:span text:style-name="T3"> </text:span></text:p>
      <text:p text:style-name="P2"/>
      <text:p text:style-name="P2"><text:span text:style-name="T6">1. </text:span><text:span text:style-name="T3">__________________________________________</text:span><text:span text:style-name="T4">_______</text:span><text:span text:style-name="T3">_______________</text:span></text:p>
      <text:p text:style-name="P2"/>
      <text:p text:style-name="P2"><text:span text:style-name="T6">2. </text:span><text:span text:style-name="T3">__________________________________________</text:span><text:span text:style-name="T4">_______</text:span><text:span text:style-name="T3">_______________</text:span></text:p>
      <text:p text:style-name="P2"/>
      <text:p text:style-name="P2"><text:span text:style-name="T6">3. </text:span><text:span text:style-name="T3">__________________________________________</text:span><text:span text:style-name="T4">_______</text:span><text:span text:style-name="T3">_______________</text:span></text:p>
      <text:p text:style-name="P2"/>
      <text:p text:style-name="P2"><text:span text:style-name="T6">4. </text:span><text:span text:style-name="T3">__________________________________________</text:span><text:span text:style-name="T4">_______</text:span><text:span text:style-name="T3">_______________</text:span></text:p>
      <text:p text:style-name="P2"/>
      <text:p text:style-name="P2"><text:span text:style-name="T6">5. </text:span><text:span text:style-name="T3">__________________________________________</text:span><text:span text:style-name="T4">_______</text:span><text:span text:style-name="T3">_______________</text:span></text:p>
      <text:p text:style-name="P2"/>
      <text:p text:style-name="P2"><text:span text:style-name="T6">6. </text:span><text:span text:style-name="T3">__________________________________________</text:span><text:span text:style-name="T4">_______</text:span><text:span text:style-name="T3">_______________</text:span></text:p>
      <text:p text:style-name="P2"/>
      <text:p text:style-name="P2"><text:span text:style-name="T6">7. </text:span><text:span text:style-name="T3">__________________________________________</text:span><text:span text:style-name="T4">_______</text:span><text:span text:style-name="T3">_______________</text:span></text:p>
      <text:p text:style-name="P2"/>
      <text:p text:style-name="P2"><text:span text:style-name="T6">8. </text:span><text:span text:style-name="T3">__________________________________________</text:span><text:span text:style-name="T4">_______</text:span><text:span text:style-name="T3">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Liberation Sans1" fo:font-family="'Liberation Sans'" style:font-style-name="Standard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2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4.5mm" style:contextual-spacing="false"/>
      <style:text-properties fo:font-size="18pt" fo:font-weight="bold" style:font-size-asian="18pt" style:font-weight-asian="bold" style:font-size-complex="18pt" style:font-weight-complex="60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style:font-name="Liberation Sans1" fo:font-family="'Liberation Sans'" style:font-style-name="Standard" style:font-family-generic="swiss" style:font-pitch="variable" fo:font-size="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7f3a7" officeooo:paragraph-rsid="0017f3a7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 fo:background-color="transparent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me Engineering, Prof. Dr. Kai Eckert, Hochschule Mannheim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ai Eckert</meta:initial-creator>
    <meta:creation-date>2024-04-09T22:29:02.066922845</meta:creation-date>
    <dc:date>2025-04-29T15:42:55.745557327</dc:date>
    <dc:creator>Kai Eckert</dc:creator>
    <meta:editing-duration>PT4H10M41S</meta:editing-duration>
    <meta:editing-cycles>5</meta:editing-cycles>
    <meta:generator>LibreOffice/25.2.2.2$Linux_X86_64 LibreOffice_project/520$Build-2</meta:generator>
    <meta:document-statistic meta:table-count="0" meta:image-count="0" meta:object-count="0" meta:page-count="1" meta:paragraph-count="14" meta:word-count="43" meta:character-count="983" meta:non-whitespace-character-count="904"/>
  </office:meta>
</office:document-meta>
</file>