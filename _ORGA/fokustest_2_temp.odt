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break-before="pag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Fokus Test Nummer:</text:span><text:s/>1<text:s text:c="41"/><text:span text:style-name="T3">Datum:<text:s/></text:span>08.07.2026</text:p>
      <text:p text:style-name="Textbody"><text:span text:style-name="T4">Version:</text:span><text:s/>~Github commit 39efc49</text:p>
      <text:p text:style-name="Textbody"><text:span text:style-name="T5">Arbeitstitel:</text:span><text:s/>Suraki</text:p>
      <text:h text:style-name="Heading2" text:outline-level="2">Ziel des Tests</text:h>
      <text:p text:style-name="Textbody">Spieldauer abschätzen und Schwierigkeit ggf. anpassen. Feedback einholen bzgl. Frustrationsquellen und fehlleitende Implementierungen korrigieren.</text:p>
      <text:p text:style-name="Textbody"/>
      <text:h text:style-name="Heading2" text:outline-level="2">Zur Verfügung gestellte Materialen</text:h>
      <text:p text:style-name="Textbody">Itch.io Seite und mündliche Erläuterung zu Genre und Tastenbelegung.</text:p>
      <text:p text:style-name="Textbody"/>
      <text:h text:style-name="Heading2" text:outline-level="2">Charakteristik der Testperson</text:h>
      <text:p text:style-name="Textbody">Zielgruppe – ja, spielt in eigener Freizeit häufig und gerne Rätselspiele</text:p>
      <text:p text:style-name="Textbody">Alter: 29</text:p>
      <text:p text:style-name="Textbody">Erfahrung: erfahren</text:p>
      <text:p text:style-name="Textbody">Frustration: ausdauernd<text:s/>(nach eigener Angabe)</text:p>
      <text:p text:style-name="Textbody"/>
      <text:h text:style-name="Heading2" text:outline-level="2">Beobachtungen beim Spielen</text:h>
      <text:p text:style-name="Textbody">-Spieler berührt Wasser kurz, beendet den Dialog nicht sofort, stirbt später, ist verblüfft</text:p>
      <text:p text:style-name="Textbody">-(Bug) Spieler teleportierte sich inkorrekt unter bestimmten Bedingungen (reproduzierbar)</text:p>
      <text:p text:style-name="Textbody">-Spieler äußert sich genervt über den Start-Dialog, der bei wiederholtem Sterben wiederholt abgespielt wird und nicht von alleine verschwindet.</text:p>
      <text:p text:style-name="Textbody">-Spieler wundert sich, dass Leuchtturm nicht den Weg blockiert aber dass kleine Brücke begehbar ist</text:p>
      <text:p text:style-name="Textbody">-(planned<text:s/>Feature)<text:s/>Spieler ist unsicher, ob augenscheinlich aufgesammelter Gegenstand im „Inventar“ sei oder nicht</text:p>
      <text:p text:style-name="Textbody">-(missing Feature)<text:s/>P2 Hindernis war nicht instantiiert</text:p>
      <text:p text:style-name="Textbody">-Spieler antizipiert mögliche Rätsel-Lösung ohne explizite Hinweise</text:p>
      <text:p text:style-name="Textbody">-Spieler kommentiert, dass das Platformer-Element zu erbarmungslos sei (kleine bzw. unklare Zeitfenster)</text:p>
      <text:p text:style-name="Textbody">-(missing Texture) Spieler war zögerlich auf dem großen Baum, da die begehbare Oberfläche nicht mit der sichtbaren Oberfläche übereinstimmte</text:p>
      <text:p text:style-name="Textbody">-Spieler war gelangweilt beim Klettern, da zu langsam. Auch das Fehlen von links/rechts Bewegung auf der Leiter hat zu Frustration geführt.</text:p>
      <text:p text:style-name="Textbody">-Fleck wo Sätzling gepflanzt werden sollte war unklar / zu klein</text:p>
      <text:soft-page-break/>
      <text:p text:style-name="Textbody">-Spieler erwartete Feedback für nicht-mögliche Aktionen zB versuchtes Fällen des massiven Baumes</text:p>
      <text:p text:style-name="Textbody"/>
      <text:p text:style-name="Textbody">-Spieldauer ~10 min</text:p>
      <text:p text:style-name="Textbody"/>
      <text:h text:style-name="Heading2" text:outline-level="2">Erkenntnisse</text:h>
      <text:p text:style-name="Textbody">-Spieler muss bewegungsunfähig gemacht werden, während der zum Tod führende Dialog durchläuft.</text:p>
      <text:p text:style-name="Textbody">-Start-Dialog soll nur bei Start abgespielt werden, bei Neustart ggf. etwas kurzes (1 Klick).</text:p>
      <text:p text:style-name="Textbody">-Eventuell 2.5D Elemente hinzufügen zu Boden oder Brücke, damit klarer wird, welche Objekte sich wo hinsichtlich 2D-Tiefen-Ebene befinden.</text:p>
      <text:p text:style-name="Textbody">-Inventar Priorität erhöht.</text:p>
      <text:p text:style-name="Textbody">-Puzzle<text:s/>2 Hindernis<text:s/>hatte noch nicht die korrekten<text:s/>Koordinaten für manche interagierbaren Objekte.</text:p>
      <text:p text:style-name="Textbody">-Eventuell Dialoge mit offensichtlichen Hinweisen reduzieren.</text:p>
      <text:p text:style-name="Textbody">-Platformen außerhalb von expliziten Platforming-Hindernissen großzügiger auslegen und bei solchen Hindernissen die sichtbare Platform mit der tatsächlichen genau übereinstimmen.</text:p>
      <text:p text:style-name="Textbody">-Klettergeschwindigkeit erhöht,<text:s/>links/rechts Bewegung auf der Leiter<text:s/>in Erwägung gezogen.</text:p>
      <text:p text:style-name="Textbody">-Sätzling<text:s/>Pflanz Fleck benötigt sichtbare, aber nicht<text:s/>zu offensichtliche Textur.</text:p>
      <text:p text:style-name="Textbody">-Tastendruck für highlighting von interagierbaren Objekten in Erwägung gezogen.</text:p>
      <text:p text:style-name="P6"/>
      <text:soft-page-break/>
      <text:p text:style-name="Textbody"><text:span text:style-name="T7">Fokus Test Nummer:</text:span><text:s/>1 <text:s text:c="40"/><text:span text:style-name="T8">Datum:<text:s/></text:span>08.07.2026</text:p>
      <text:p text:style-name="Textbody"><text:span text:style-name="T9">Version:</text:span><text:s/>~Github commit 39efc49</text:p>
      <text:p text:style-name="Textbody"><text:span text:style-name="T10">Arbeitstitel:</text:span><text:s/>Suraki</text:p>
      <text:h text:style-name="Heading2" text:outline-level="2">Ziel des Tests</text:h>
      <text:p text:style-name="Textbody">Spieldauer abschätzen und Schwierigkeit ggf. anpassen. Feedback einholen bzgl. Frustrationsquellen und fehlleitende Implementierungen korrigieren.</text:p>
      <text:p text:style-name="Textbody"/>
      <text:h text:style-name="Heading2" text:outline-level="2">Zur Verfügung gestellte Materialen</text:h>
      <text:p text:style-name="Textbody">Itch.io Seite und mündliche Erläuterung zu Genre und Tastenbelegung.</text:p>
      <text:p text:style-name="Textbody"/>
      <text:h text:style-name="Heading2" text:outline-level="2">Charakteristik der Testperson</text:h>
      <text:p text:style-name="Textbody">Zielgruppe – ja, spielt in eigener Freizeit gelegentlich und auch Rätselspiele</text:p>
      <text:p text:style-name="Textbody">Alter: 22</text:p>
      <text:p text:style-name="Textbody">Erfahrung: erfahren</text:p>
      <text:p text:style-name="Textbody">Frustration: ausdauernd (nach eigener Angabe)</text:p>
      <text:p text:style-name="Textbody"/>
      <text:h text:style-name="Heading2" text:outline-level="2">Beobachtungen beim Spielen</text:h>
      <text:p text:style-name="Textbody">-(Bug) Spieler teleportierte sich inkorrekt unter bestimmten Bedingungen (reproduzierbar)</text:p>
      <text:p text:style-name="Textbody">-(planned Feature) Spieler unsicher ob Axt nach Nutzen noch in Besitz sei</text:p>
      <text:p text:style-name="Textbody">-Spieler versucht vergeblich, Sätzling mit Axt zu fällen</text:p>
      <text:p text:style-name="Textbody">-(planned Feature) Spieler kann Inventarbegrenzung (1 Slot) nicht implizit nachvollziehen</text:p>
      <text:p text:style-name="Textbody">-P2 Baum ist mit P1 Baum verwechselbar</text:p>
      <text:p text:style-name="Textbody">-(planned Feature) Zeitreise in solide Objekte (zB Berg) provoziert unvorhergesehen Resultate</text:p>
      <text:p text:style-name="Textbody">-Spieler kann Tod für immer aufhalten indem Dialog nicht beendet wird</text:p>
      <text:p text:style-name="Textbody">-(missing Collider) Brückenrumpf ist überraschend nicht kollidierend</text:p>
      <text:p text:style-name="Textbody">-(missing Textures) Unklarheit, was Hintergrund sei</text:p>
      <text:p text:style-name="Textbody">-Unklarheit, was interagierbar sei</text:p>
      <text:p text:style-name="Textbody">-Unklarheit über Inventar</text:p>
      <text:p text:style-name="Textbody">-Ziel (Auf Leuchtturm gelangen) unklar</text:p>
      <text:p text:style-name="Textbody"/>
      <text:p text:style-name="Textbody">-Spieldauer ~19 min</text:p>
      <text:soft-page-break/>
      <text:p text:style-name="Textbody">-Speedrun: &lt;1 min durch Ausnutzen von Teleportations-Bug und nicht-Beenden des Todes-Dialogs.</text:p>
      <text:p text:style-name="Textbody"/>
      <text:h text:style-name="Heading2" text:outline-level="2">Erkenntnisse</text:h>
      <text:p text:style-name="Textbody">-Inventar Priorität erhöht.</text:p>
      <text:p text:style-name="Textbody">-P2 Baum verschieben</text:p>
      <text:p text:style-name="Textbody">-Für Zeitreise nur gültige Zielorte erlauben geplant</text:p>
      <text:p text:style-name="Textbody">-Spieler muss bewegungsunfähig gemacht werden, während der zum Tod führende Dialog durchläuft.</text:p>
      <text:p text:style-name="Textbody">-Eventuell 2.5D Elemente hinzufügen zu Boden oder Brücke, damit klarer wird, welche Objekte sich wo hinsichtlich 2D-Tiefen-Ebene befinden.</text:p>
      <text:p text:style-name="Textbody">-Tastendruck für highlighting von interagierbaren Objekten in Erwägung gezogen.</text:p>
      <text:p text:style-name="Textbody">-Dialog einbauen, der Ziel (auf Leuchtturm gelangen) naheleg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Liberation Sans" style:font-name-asian="Noto Sans CJK SC" fo:font-weight="bold" style:font-weight-asian="bold" style:font-weight-complex="bold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7-10T10:12:00Z</dc:date>
    <meta:template xlink:href="Normal.dotm" xlink:type="simple"/>
    <meta:editing-cycles>6</meta:editing-cycles>
    <meta:editing-duration>PT3540S</meta:editing-duration>
    <meta:document-statistic meta:page-count="4" meta:paragraph-count="9" meta:word-count="710" meta:character-count="4751" meta:row-count="33" meta:non-whitespace-character-count="4050"/>
  </office:meta>
</office:document-meta>
</file>