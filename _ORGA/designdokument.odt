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Textbody" style:family="paragraph">
      <style:text-properties style:font-name-asian="Noto Sans CJK SC" fo:font-weight="bold" style:font-weight-asian="bold" style:font-weight-complex="bold" fo:font-size="16pt" style:font-size-asian="16pt" style:font-size-complex="16pt"/>
    </style:style>
    <style:style style:name="P6" style:parent-style-name="Textbody" style:family="paragraph">
      <style:text-properties style:font-name-asian="Noto Sans CJK SC" fo:font-weight="bold" style:font-weight-asian="bold" style:font-weight-complex="bold" fo:font-size="16pt" style:font-size-asian="16pt" style:font-size-complex="16pt"/>
    </style:style>
    <style:style style:name="P7" style:parent-style-name="Textbody" style:family="paragraph">
      <style:text-properties style:font-name-asian="Noto Sans CJK SC" fo:font-weight="bold" style:font-weight-asian="bold" style:font-weight-complex="bold" fo:font-size="16pt" style:font-size-asian="16pt" style:font-size-complex="16pt"/>
    </style:style>
    <style:style style:name="P8" style:parent-style-name="Textbody" style:family="paragraph">
      <style:text-properties style:font-name-asian="Noto Sans CJK SC" fo:font-weight="bold" style:font-weight-asian="bold" style:font-weight-complex="bold" fo:font-size="16pt" style:font-size-asian="16pt" style:font-size-complex="16pt"/>
    </style:style>
  </office:automatic-styles>
  <office:body>
    <office:text text:use-soft-page-breaks="true">
      <text:p text:style-name="P1"><text:span text:style-name="T2">Design-Dokument Nummer:</text:span><text:s/>______ <text:s text:c="40"/><text:span text:style-name="T3">Datum:<text:s/></text:span>_____________________</text:p>
      <text:p text:style-name="Textbody"/>
      <text:p text:style-name="Textbody"><text:span text:style-name="T4">Arbeitstitel:</text:span><text:s/>Suraki</text:p>
      <text:p text:style-name="P5">Kern (Vision oder Box-Rückseitentext)</text:p>
      <text:p text:style-name="Textbody">Suraki ist ein Rätsel-Adventure, in welchem man durch das Verändern der Vergangenheit in der Gegenwart Hindernisse überwindet. Der Grafikstil ist<text:s/>hauptsächlich<text:s/>hand-gemalt mit vereinzelt kuratierten<text:s/>Elementen. Der Spieler steuert einen humanoiden Roboter in einer 2D Welt, kann nach links &amp; rechts laufen<text:s/>und rennen, springen, klettern und "zeitreisen".<text:s/>Er kann nicht schwimmen; Berührung mit Wasser führt zu seinem „Tod“ und Zurücksetzen.<text:s/>Die 2D Welt ist recht kompakt, ohne Hindernisse bräuchte der Spieler etwa 20 Sekunden um von dem einen Ende zum Anderen zu laufen. Die Vergangenheit stellt eine zweite Welt dar, die in groben Zügen das gleiche begehbare Gelände hat wie die Gegenwart. Für den Anfang wird das Spielziel lediglich daraus bestehen, die Spitze des<text:s/>Leuchtturmes<text:s/>zu erreichen.<text:line-break/>Die Kamera ist auf die seitliche Ansicht der Ebene, in der der Spielcharakter sich bewegt und mit Objekten interagiert (kollidiert / etwas aufhebt / klettert), fixiert. Vor dieser Ebene gibt es eine dekorative Ebene, die schemenhaft Objekte in der Umgebung enthält, und den Blick auf die Spielebene verdecken kann, um Tiefe zu erzeugen. Hinter der Spielebene befinden<text:s/>sich<text:s/>weitere<text:s/>dekorative Ebenen, in denen<text:s/>Bäume oder Hügel und allgemein Elemente des Hintergrunds dargestellt werden und ganz hinten ein handgezeichnetes Hintergrundbild. Durch Parallaxe soll der Effekt von Tiefe erzeugt werden.</text:p>
      <text:p text:style-name="P6">Team und Verantwortlichkeiten</text:p>
      <text:p text:style-name="Textbody">Luise: Grafiken, Itch-Seite, Menu-Elemente, Dialoge, Inventar-Display</text:p>
      <text:p text:style-name="Textbody">Benedek:<text:s/>Parallaxe, Spielereingabe,<text:s/>Spiellogik</text:p>
      <text:p text:style-name="P7"/>
      <text:p text:style-name="P8">30 Sekunden Gameplay</text:p>
      <text:p text:style-name="Textbody">Der Spielcharakter erwacht in der Spielwelt auf der linken Seite in der Gegenwart <text:s/>und läuft nach rechts über die Karte. Auf dem Weg findet er einen Sprössling eines Baumes, welchen er aufsammelt. Er erreicht schließlich einen breiten Fluss, den er nicht überspringen kann. Er reist mit dem Sprössling in die Vergangenheit, in welcher er diesen neben dem Fluss pflanzt. Daraufhin reist der Spieler zurück in die Gegenwart, fällt dort den ausgewachsenen Baum, sodass dieser über den Fluss fällt und so eine Brücke bildet und<text:s/>er<text:s/>überquert den Fluss.</text:p>
      <text:p text:style-name="Textbody"/>
      <text:h text:style-name="Heading2" text:outline-level="2">Risiken</text:h>
      <text:p text:style-name="Textbody"/>
      <text:p text:style-name="Textbody">- Das Spiel könnte zu umfangreich für die gegebene Zeit sein.</text:p>
      <text:p text:style-name="Textbody">- Rätsel bergen inherent das Risiko für Frustration</text:p>
      <text:p text:style-name="Textbody">-Schwierigkeit lässt sich nicht einfach skalieren</text:p>
      <text:p text:style-name="Textbody">-<text:s/>Inhalt hinzuzufügen bedeutet Rätsel auszudenken und ist nicht trivial. Es könnte einen Mangel an Inhalt geben, wodurch die Spieler kaum spielen kön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svg:font-family="Droid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in" fo:margin-bottom="0.177in"/>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style:font-name-complex="Droid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andFooter" style:display-name="Header and 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Footer" style:display-name="Footer" style:family="paragraph" style:parent-style-name="HeaderandFooter">
      <style:text-properties style:font-name="Liberation Sans" style:font-name-asian="Liberation Sans" style:font-name-complex="Liberation Sans" fo:font-size="8pt" style:font-size-asian="8pt" fo:hyphenate="false"/>
    </style:style>
    <style:style style:name="Header" style:display-name="Head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header>
        <text:p text:style-name="Footer">Game Engineering, Prof. Dr. Kai Eckert, Hochschule Mannheim</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ai Eckert</meta:initial-creator>
    <dc:creator>Benedek Kovacs</dc:creator>
    <meta:creation-date>2024-04-09T22:29:00Z</meta:creation-date>
    <dc:date>2026-07-10T10:20:00Z</dc:date>
    <meta:template xlink:href="Normal.dotm" xlink:type="simple"/>
    <meta:editing-cycles>8</meta:editing-cycles>
    <meta:editing-duration>PT3300S</meta:editing-duration>
    <meta:document-statistic meta:page-count="1" meta:paragraph-count="5" meta:word-count="387" meta:character-count="2590" meta:row-count="18" meta:non-whitespace-character-count="2208"/>
  </office:meta>
</office:document-meta>
</file>