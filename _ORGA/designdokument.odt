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svg:font-family="Droid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inherit" svg:font-family="inherit"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extbody"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Textbody" style:family="paragraph">
      <style:text-properties style:font-name="inherit" fo:font-size="12pt" style:font-size-asian="12pt"/>
    </style:style>
    <style:style style:name="P6" style:parent-style-name="Textbody" style:family="paragraph">
      <style:paragraph-properties fo:margin-bottom="0in" style:line-height-at-least="0.2291in"/>
      <style:text-properties style:font-name="inherit" fo:font-size="12pt" style:font-size-asian="12pt"/>
    </style:style>
  </office:automatic-styles>
  <office:body>
    <office:text text:use-soft-page-breaks="true">
      <text:p text:style-name="P1"><text:span text:style-name="T2">Design-Dokument Nummer:</text:span><text:s/>______ <text:s text:c="40"/><text:span text:style-name="T3">Datum:<text:s/></text:span>_____________________</text:p>
      <text:p text:style-name="Textbody"/>
      <text:p text:style-name="Textbody"><text:span text:style-name="T4">Arbeitstitel:</text:span><text:s/>____________________________________________________________________</text:p>
      <text:h text:style-name="Heading2" text:outline-level="2">Kern (Vision oder Box-Rückseitentext)</text:h>
      <text:p text:style-name="P5">SPIELNAME ist ein Rätsel-Adventure, in welchem man durch das Verändern der Vergangenheit in der Gegenwart Hindernisse überwindet. Der Grafikstil ist pixel-art, mit vereinzelt hand-gezeichneten Elementen. Der Spieler steuert einen humanoiden Roboter in einer 2D Welt, kann nach links &amp; rechts laufen, springen, klettern und "zeitreisen". Die Welt enthält eine kleine Siedlung mit Häusern und<text:s/>menschlichen<text:s/>NPCs und der Spieler kann die Häuser betreten, wodurch er in eine andere Szene wechselt, und nimmt wahr, wenn die NPCs etwas sagen (Sprechblasen), aber die NPCs nehmen ihn nicht wahr. Die 2D Welt ist recht kompakt, ohne Hindernisse bräuchte der Spieler etwa 20 Sekunden um von dem einen Ende zum Anderen zu laufen. Die Vergangenheit stellt eine zweite Welt dar, die in groben Zügen das gleiche begehbare Gelände hat wie die Gegenwart. Für den Anfang wird das Spielziel lediglich daraus bestehen, die Spitze des Berges auf der rechten Seite zu erreichen.<text:line-break/>Die Kamera ist auf die seitliche Ansicht der Ebene, in der der Spielcharakter sich bewegt und mit Objekten interagiert (kollidiert / etwas aufhebt / klettert), fixiert. Vor dieser Ebene gibt es eine dekorative Ebene, die schemenhaft Objekte in der Umgebung enthält, und den Blick auf die Spielebene verdecken kann, um Tiefe zu erzeugen. Hinter der Spielebene ist eine Ebene mit Gebäuden und den NPCs. Hinter dieser Ebene befindet sich wieder eine dekorative Ebene, in der Bäume oder Hügel und allgemein Elemente des Hintergrunds dargestellt werden und ganz hinten ein handgezeichnetes Hintergrundbild. Durch Parallaxe soll der Effekt von Tiege erzeugt werden.<text:s/></text:p>
      <text:h text:style-name="Heading2" text:outline-level="2">Team und Verantwortlichkeiten</text:h>
      <text:p text:style-name="Textbody">Luise &amp; Benedek</text:p>
      <text:p text:style-name="Textbody"/>
      <text:p text:style-name="Textbody"/>
      <text:p text:style-name="Textbody"/>
      <text:h text:style-name="Heading2" text:outline-level="2">30 Sekunden Gameplay</text:h>
      <text:p text:style-name="P6">Der Spielcharakter erwacht in der Spielwelt auf der linken Seite in der Gegenwart <text:s/>und läuft nach rechts über die Karte. Auf dem Weg findet er einen Sprössling eines Baumes, welchen er aufsammelt. Er erreicht schließlich einen breiten Fluss, den er nicht überspringen kann. Er reist mit dem Sprössling in die Vergangenheit, in welcher er diesen neben dem Fluss pflanzt. Daraufhin reist der Spieler zurück in die Gegenwart, fällt dort den ausgewachsenen Baum, sodass dieser über den Fluss fällt und so eine Brücke bildet und überquert den Fluss.</text:p>
      <text:p text:style-name="Textbody"/>
      <text:p text:style-name="Textbody"/>
      <text:p text:style-name="Textbody"/>
      <text:p text:style-name="Textbody"/>
      <text:p text:style-name="Textbody"/>
      <text:p text:style-name="Textbody"/>
      <text:h text:style-name="Heading2" text:outline-level="2">Risiken</text:h>
      <text:p text:style-name="Textbod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svg:font-family="Droid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inherit" svg:font-family="inherit"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Droid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margin-bottom="0.177in"/>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style:font-name="Liberation Sans" style:font-name-asian="Liberation Sans" style:font-name-complex="Liberation Sans" fo:font-size="11pt" style:font-size-asian="11pt" fo:hyphenate="false"/>
    </style:style>
    <style:style style:name="List" style:display-name="List" style:family="paragraph" style:parent-style-name="Textbody">
      <style:text-properties style:font-name-complex="Droid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Framecontents" style:display-name="Frame contents" style:family="paragraph" style:parent-style-name="Standard">
      <style:text-properties fo:hyphenate="false"/>
    </style:style>
    <style:style style:name="Text" style:display-name="Text" style:family="paragraph" style:parent-style-name="Caption">
      <style:text-properties fo:hyphenate="false"/>
    </style:style>
    <style:style style:name="HeaderandFooter" style:display-name="Header and Footer" style:family="paragraph" style:parent-style-name="Standard">
      <style:paragraph-properties text:number-lines="false">
        <style:tab-stops>
          <style:tab-stop style:type="center" style:position="3.3472in"/>
          <style:tab-stop style:type="right" style:position="6.6951in"/>
        </style:tab-stops>
      </style:paragraph-properties>
      <style:text-properties fo:hyphenate="false"/>
    </style:style>
    <style:style style:name="Footer" style:display-name="Footer" style:family="paragraph" style:parent-style-name="HeaderandFooter">
      <style:text-properties style:font-name="Liberation Sans" style:font-name-asian="Liberation Sans" style:font-name-complex="Liberation Sans" fo:font-size="8pt" style:font-size-asian="8pt" fo:hyphenate="false"/>
    </style:style>
    <style:style style:name="Header" style:display-name="Header" style:family="paragraph" style:parent-style-name="HeaderandFooter">
      <style:paragraph-properties>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header>
        <text:p text:style-name="Footer">Game Engineering, Prof. Dr. Kai Eckert, Hochschule Mannheim</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Kai Eckert</meta:initial-creator>
    <dc:creator>Benedek Kovacs</dc:creator>
    <meta:creation-date>2026-05-29T20:25:00Z</meta:creation-date>
    <dc:date>2026-06-02T11:00:00Z</dc:date>
    <meta:template xlink:href="Normal.dotm" xlink:type="simple"/>
    <meta:editing-cycles>4</meta:editing-cycles>
    <meta:editing-duration>PT540S</meta:editing-duration>
    <meta:document-statistic meta:page-count="2" meta:paragraph-count="4" meta:word-count="368" meta:character-count="2468" meta:row-count="17" meta:non-whitespace-character-count="2104"/>
  </office:meta>
</office:document-meta>
</file>