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text-properties fo:font-size="16pt" fo:font-weight="bold" style:font-name-asian="Noto Sans CJK SC" style:font-size-asian="16pt" style:font-weight-asian="bold" style:font-size-complex="16pt" style:font-weight-complex="bold"/>
    </style:style>
    <style:style style:name="P3" style:family="paragraph" style:parent-style-name="Text_20_body">
      <style:text-properties officeooo:paragraph-rsid="001f1644"/>
    </style:style>
    <style:style style:name="T1" style:family="text">
      <style:text-properties fo:font-weight="bold" style:font-weight-asian="bold" style:font-weight-complex="bold"/>
    </style:style>
    <style:style style:name="T2" style:family="text">
      <style:text-properties officeooo:rsid="001f16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Design-Dokument Nummer:</text:span></text:span> ______ <text:s text:c="40"/><text:span text:style-name="Default_20_Paragraph_20_Font"><text:span text:style-name="T1">Datum: </text:span></text:span>_____________________</text:p>
      <text:p text:style-name="Text_20_body"/>
      <text:p text:style-name="Text_20_body"><text:span text:style-name="Default_20_Paragraph_20_Font"><text:span text:style-name="T1">Arbeitstitel:</text:span></text:span> ____________________________________________________________________</text:p>
      <text:p text:style-name="P2">Kern (Vision oder Box-Rückseitentext)</text:p>
      <text:p text:style-name="Text_20_body"><text:span text:style-name="T2">Suraki</text:span> ist ein Rätsel-Adventure, in welchem man durch das Verändern der Vergangenheit in der Gegenwart Hindernisse überwindet. Der Grafikstil ist pixel-art, mit vereinzelt hand-gezeichneten Elementen. Der Spieler steuert einen humanoiden Roboter in einer 2D Welt, kann nach links &amp; rechts laufen, springen, klettern und "zeitreisen". <text:span text:style-name="T2">D</text:span>ie 2D Welt ist recht kompakt, ohne Hindernisse bräuchte der Spieler etwa 20 Sekunden um von dem einen Ende zum Anderen zu laufen. Die Vergangenheit stellt eine zweite Welt dar, die in groben Zügen das gleiche begehbare Gelände hat wie die Gegenwart. Für den Anfang wird das Spielziel lediglich daraus bestehen, die Spitze des Berges auf der rechten Seite zu erreichen.<text:line-break/>Die Kamera ist auf die seitliche Ansicht der Ebene, in der der Spielcharakter sich bewegt und mit Objekten interagiert (kollidiert / etwas aufhebt / klettert), fixiert. Vor dieser Ebene gibt es eine dekorative Ebene, die schemenhaft Objekte in der Umgebung enthält, und den Blick auf die Spielebene verdecken kann, um Tiefe zu erzeugen. Hinter der Spielebene ist eine Ebene mit Gebäuden und den NPCs. Hinter dieser Ebene befindet sich wieder eine dekorative Ebene, in der Bäume oder Hügel und allgemein Elemente des Hintergrunds dargestellt werden und ganz hinten ein handgezeichnetes Hintergrundbild. Durch Parallaxe soll der Effekt von Tiege erzeugt werden. </text:p>
      <text:p text:style-name="P2">Team und Verantwortlichkeiten</text:p>
      <text:p text:style-name="P3">Luise: <text:span text:style-name="T2">Grafiken, Itch-Seite, Menu-Elemente, Dialoge</text:span></text:p>
      <text:p text:style-name="P3">Benedek: <text:span text:style-name="T2">Spiellogik</text:span></text:p>
      <text:p text:style-name="P2"/>
      <text:p text:style-name="P2">30 Sekunden Gameplay</text:p>
      <text:p text:style-name="Text_20_body">Der Spielcharakter erwacht in der Spielwelt auf der linken Seite in der Gegenwart <text:s/>und läuft nach rechts über die Karte. Auf dem Weg findet er einen Sprössling eines Baumes, welchen er aufsammelt. Er erreicht schließlich einen breiten Fluss, den er nicht überspringen kann. Er reist mit dem Sprössling in die Vergangenheit, in welcher er diesen neben dem Fluss pflanzt. Daraufhin reist der Spieler zurück in die Gegenwart, fällt dort den ausgewachsenen Baum, sodass dieser über den Fluss fällt und so eine Brücke bildet und überquert den Fluss.</text:p>
      <text:p text:style-name="Text_20_body"/>
      <text:h text:style-name="Heading_20_2" text:outline-level="2">Risiken</text:h>
      <text:p text:style-name="Text_20_body"/>
      <text:p text:style-name="Text_20_body">- Das Spiel könnte zu umfangreich für die gegebene Zeit sein.</text:p>
      <text:p text:style-name="Text_20_body">- <text:span text:style-name="T2">Es könnte einen Mangel an Inhalt geben, wodurch die Spieler kaum spielen können</text:span></text:p>
      <text:p text:style-name="Text_20_body">- <text:span text:style-name="T2">Durch zu weite Strecken ist der Spielfluss zu zäh</text:span></text:p>
      <text:p text:style-name="Text_20_body">- <text:span text:style-name="T2">Interaktionspunkte sind nicht erkennba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Droid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cm" fo:margin-bottom="0.45cm" style:contextual-spacing="false"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style:font-name-complex="Droid Sans" style:font-family-complex="'Droid Sans'"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02cm" style:type="center"/>
          <style:tab-stop style:position="17.006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style:font-name="Liberation Sans" fo:font-family="'Liberation Sans'" style:font-family-generic="swiss" style:font-pitch="variable" fo:font-size="8pt" style:font-name-asian="Liberation Sans" style:font-family-asian="'Liberation Sans'" style:font-family-generic-asian="swiss" style:font-pitch-asian="variable" style:font-size-asian="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Kai Eckert</meta:initial-creator>
    <meta:creation-date>2024-04-09T22:29:00Z</meta:creation-date>
    <dc:date>2026-07-03T19:22:19.538175300</dc:date>
    <meta:editing-cycles>7</meta:editing-cycles>
    <meta:editing-duration>PT47M53S</meta:editing-duration>
    <meta:document-statistic meta:table-count="0" meta:image-count="0" meta:object-count="0" meta:page-count="1" meta:paragraph-count="15" meta:word-count="366" meta:character-count="2545" meta:non-whitespace-character-count="2152"/>
    <meta:template xlink:type="simple" xlink:actuate="onRequest" xlink:title="" xlink:href="Normal.dotm"/>
  </office:meta>
</office:document-meta>
</file>