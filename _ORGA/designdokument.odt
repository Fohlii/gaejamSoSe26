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f3a7" officeooo:paragraph-rsid="0017f3a7"/>
    </style:style>
    <style:style style:name="P2" style:family="paragraph" style:parent-style-name="Text_20_body">
      <style:text-properties officeooo:paragraph-rsid="0017f3a7"/>
    </style:style>
    <style:style style:name="P3" style:family="paragraph" style:parent-style-name="Text_20_body">
      <style:text-properties officeooo:rsid="001831a0"/>
    </style:style>
    <style:style style:name="P4" style:family="paragraph" style:parent-style-name="Text_20_body">
      <style:text-properties officeooo:rsid="001831a0" officeooo:paragraph-rsid="001831a0"/>
    </style:style>
    <style:style style:name="T1" style:family="text">
      <style:text-properties officeooo:rsid="0017f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3a7" style:font-weight-asian="bold" style:font-weight-complex="bold"/>
    </style:style>
    <style:style style:name="T4" style:family="text">
      <style:text-properties officeooo:rsid="0019f733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Design-Dokument </text:span><text:span text:style-name="T3">Nummer:</text:span><text:span text:style-name="T1"> ______ <text:s text:c="40"/></text:span><text:span text:style-name="T3">Datum: </text:span><text:span text:style-name="T1">_____________________</text:span></text:p>
      <text:p text:style-name="P2"/>
      <text:p text:style-name="P2"><text:span text:style-name="T2">Arbeitstitel</text:span><text:span text:style-name="T3">:</text:span><text:span text:style-name="T1"> __________________________________________</text:span><text:span text:style-name="T4">_______</text:span><text:span text:style-name="T1">___________________</text:span></text:p>
      <text:h text:style-name="Heading_20_2" text:outline-level="2" text:is-list-header="true">Kern (Vision oder Box-Rückseitentext)</text:h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Team und Verantwortlichkeiten</text:h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30 Sekunden Gameplay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Risike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Liberation Sans1" fo:font-family="'Liberation Sans'" style:font-style-name="Standard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4.5m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style:font-name="Liberation Sans1" fo:font-family="'Liberation Sans'" style:font-style-name="Standard" style:font-family-generic="swiss" style:font-pitch="variable" fo:font-size="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f3a7" officeooo:paragraph-rsid="0017f3a7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Game Engineering, Prof. Dr. Kai Eckert, Hochschule Mannheim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i Eckert</meta:initial-creator>
    <meta:creation-date>2024-04-09T22:29:02.066922845</meta:creation-date>
    <dc:date>2024-04-09T22:55:10.127120994</dc:date>
    <dc:creator>Kai Eckert</dc:creator>
    <meta:editing-duration>PT3M56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8" meta:word-count="34" meta:character-count="392" meta:non-whitespace-character-count="326"/>
  </office:meta>
</office:document-meta>
</file>