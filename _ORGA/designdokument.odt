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Text_20_body">
      <style:text-properties officeooo:paragraph-rsid="0017f3a7"/>
    </style:style>
    <style:style style:name="P2" style:family="paragraph" style:parent-style-name="Text_20_body">
      <style:text-properties style:font-name="inherit" fo:font-size="12pt" officeooo:rsid="001831a0" loext:padding="0cm" loext:border="none"/>
    </style:style>
    <style:style style:name="P3" style:family="paragraph" style:parent-style-name="Text_20_body" style:list-style-name="L1">
      <style:paragraph-properties fo:margin-left="0cm" fo:margin-right="0cm" fo:margin-top="0cm" fo:margin-bottom="0cm" style:contextual-spacing="false" style:line-height-at-least="0.582cm" fo:text-indent="0cm" style:auto-text-indent="false"/>
      <style:text-properties style:font-name="inherit" fo:font-size="12pt" officeooo:rsid="001831a0" officeooo:paragraph-rsid="001c1c89" loext:padding="0cm" loext:border="none"/>
    </style:style>
    <style:style style:name="T1" style:family="text">
      <style:text-properties fo:font-weight="bold" style:font-weight-asian="bold" style:font-weight-complex="bold"/>
    </style:style>
    <style:style style:name="T2" style:family="text">
      <style:text-properties fo:font-weight="bold" officeooo:rsid="0017f3a7" style:font-weight-asian="bold" style:font-weight-complex="bold"/>
    </style:style>
    <style:style style:name="T3" style:family="text">
      <style:text-properties officeooo:rsid="0017f3a7"/>
    </style:style>
    <style:style style:name="T4" style:family="text">
      <style:text-properties officeooo:rsid="0019f733"/>
    </style:style>
    <style:style style:name="T5" style:family="text">
      <style:text-properties officeooo:rsid="001c1c89"/>
    </style:style>
    <style:style style:name="T6" style:family="text">
      <style:text-properties officeooo:rsid="001d7943"/>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esign-Dokument </text:span><text:span text:style-name="T2">Nummer:</text:span><text:span text:style-name="T3"> ______ <text:s text:c="40"/></text:span><text:span text:style-name="T2">Datum: </text:span><text:span text:style-name="T3">_____________________</text:span></text:p>
      <text:p text:style-name="P1"/>
      <text:p text:style-name="P1"><text:span text:style-name="T1">Arbeitstitel</text:span><text:span text:style-name="T2">:</text:span><text:span text:style-name="T3"> __________________________________________</text:span><text:span text:style-name="T4">_______</text:span><text:span text:style-name="T3">___________________</text:span></text:p>
      <text:h text:style-name="Heading_20_2" text:outline-level="2" text:is-list-header="true">Kern (Vision oder Box-Rückseitentext)</text:h>
      <text:p text:style-name="P2"><text:span text:style-name="T5">SPIELNAME ist ein</text:span> Rätsel-Adventure, <text:span text:style-name="T5">in welchem</text:span> man durch das Verändern der Vergangenheit in der Gegenwart Hindernisse überwindet. <text:span text:style-name="T5">Der</text:span> Grafik<text:span text:style-name="T5">stil</text:span> <text:span text:style-name="T5">ist</text:span> pixel-art. <text:span text:style-name="T5">Der menschliche Spieler bewegt sich</text:span> in einer 2D Welt, kann nach links/rechts laufen, springen, klettern und "durch die zeit reisen". <text:span text:style-name="T5">Während er sich in der Vergangenheit befindet ist der Spieler für jegliche NPCs unsichtbar. </text:span>Die 2D Welt <text:span text:style-name="T5">ist</text:span> recht kompakt, <text:span text:style-name="T5">ohne Hindernisse bräuchte der Spieler etwa 20 Sekunden um von einem Ende zum Anderen zu laufen.</text:span> <text:span text:style-name="T5">Die Vergangenheit stellt eine zweite Welt dar</text:span>. Einmal die Ebene wo der Spielcharakter sich drin bewegt und mit Objekten interagiert (kollidiert / etwas aufhebt / klettert). <text:span text:style-name="T5">Die Spielwelt beinhaltet mehrere Ebenen, eine dekorative Ebene, die Spielerebene und eine dritte Ebene mit Gebäuden. Diese Gebäude kann der Spieler betreten, wodurch er in eine andere Szene wechselt.</text:span></text:p>
      <text:h text:style-name="Heading_20_2" text:outline-level="2">Team und Verantwortlichkeiten</text:h>
      <text:p text:style-name="Text_20_body"/>
      <text:p text:style-name="Text_20_body"/>
      <text:p text:style-name="Text_20_body"/>
      <text:p text:style-name="Text_20_body"/>
      <text:h text:style-name="Heading_20_2" text:outline-level="2" text:is-list-header="true">30 Sekunden Gameplay</text:h>
      <text:list text:style-name="L1">
        <text:list-header>
          <text:p text:style-name="P3"><text:span text:style-name="T5">Der Spieler läuft in der Gegenwart über die Karte. Auf dem Weg findet er einen Sprössling eines Baumes, welchen er aufsammelt. Er erreicht schließlich einen Fluss, welchen er überqueren muss. Um dies zu tun reist er mit dem Sprössling in die Vergangenheit, in welcher er diesen neben dem Fluss pflanzt. Daraufhin reist der Spieler zurück</text:span> in die Gegenwart reist, <text:span text:style-name="T5">fällt</text:span> dort den ausgewachsenen Baum, <text:span text:style-name="T6">sodass dieser über den Fluss fällt und so eine Brücke bildet.</text:span></text:p>
        </text:list-header>
      </text:list>
      <text:p text:style-name="Text_20_body"/>
      <text:p text:style-name="Text_20_body"/>
      <text:p text:style-name="Text_20_body"/>
      <text:p text:style-name="Text_20_body"/>
      <text:p text:style-name="Text_20_body"/>
      <text:p text:style-name="Text_20_body"/>
      <text:h text:style-name="Heading_20_2" text:outline-level="2"><text:soft-page-break/>Risiken</text:h>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Droid Sans"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style:font-family-complex="'Droid Sans'" style:font-family-generic-complex="swiss"/>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2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45cm" style:contextual-spacing="false"/>
      <style:text-properties fo:font-size="18pt" fo:font-weight="bold" style:font-size-asian="18pt" style:font-weight-asian="bold" style:font-size-complex="18pt" style:font-weight-complex="600"/>
    </style:style>
    <style:style style:name="Frame_20_contents" style:display-name="Frame contents" style:family="paragraph" style:parent-style-name="Standard" style:class="extra"/>
    <style:style style:name="Text" style:family="paragraph" style:parent-style-name="Caption"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4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2cm" style:type="center"/>
          <style:tab-stop style:position="17.006cm" style:type="right"/>
        </style:tab-stops>
      </style:paragraph-properties>
      <style:text-properties style:font-name="Liberation Sans1" fo:font-family="'Liberation Sans'" style:font-style-name="Standard" style:font-family-generic="swiss" style:font-pitch="variable" fo:font-size="8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7f3a7" officeooo:paragraph-rsid="0017f3a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me Engineering, Prof. Dr. Kai Eckert, Hochschule Mannheim</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Kai Eckert</meta:initial-creator>
    <meta:creation-date>2024-04-09T22:29:02.066922845</meta:creation-date>
    <dc:date>2026-05-29T17:56:57.844349900</dc:date>
    <meta:editing-duration>PT4M14S</meta:editing-duration>
    <meta:editing-cycles>3</meta:editing-cycles>
    <meta:generator>LibreOffice/25.2.7.2$Windows_X86_64 LibreOffice_project/5cbfd1ab6520636bb5f7b99185aa69bd7456825d</meta:generator>
    <meta:document-statistic meta:table-count="0" meta:image-count="0" meta:object-count="0" meta:page-count="2" meta:paragraph-count="9" meta:word-count="233" meta:character-count="1676" meta:non-whitespace-character-count="1412"/>
  </office:meta>
</office:document-meta>
</file>