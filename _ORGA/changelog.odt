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.538cm" fo:margin-left="-0.677cm" table:align="left"/>
    </style:style>
    <style:style style:name="Tabelle1.A" style:family="table-column">
      <style:table-column-properties style:column-width="4.918cm"/>
    </style:style>
    <style:style style:name="Tabelle1.B" style:family="table-column">
      <style:table-column-properties style:column-width="4.207cm"/>
    </style:style>
    <style:style style:name="Tabelle1.C" style:family="table-column">
      <style:table-column-properties style:column-width="0.51cm"/>
    </style:style>
    <style:style style:name="Tabelle1.D" style:family="table-column">
      <style:table-column-properties style:column-width="4.103cm"/>
    </style:style>
    <style:style style:name="Tabelle1.E" style:family="table-column">
      <style:table-column-properties style:column-width="3.801cm"/>
    </style:style>
    <style:style style:name="Tabelle1.1" style:family="table-row">
      <style:table-row-properties style:min-row-height="0.75cm" style:use-optimal-row-height="false"/>
    </style:style>
    <style:style style:name="Tabelle1.A1" style:family="table-cell">
      <style:table-cell-properties fo:padding-left="0.018cm" fo:padding-right="0.018cm" fo:padding-top="0cm" fo:padding-bottom="0cm" fo:border="none" style:writing-mode="lr-tb"/>
    </style:style>
    <style:style style:name="Tabelle1.E1" style:family="table-cell">
      <style:table-cell-properties fo:padding="0cm" fo:border="none" style:writing-mode="lr-tb"/>
    </style:style>
    <style:style style:name="Tabelle1.2" style:family="table-row">
      <style:table-row-properties style:min-row-height="0.536cm" style:use-optimal-row-height="false"/>
    </style:style>
    <style:style style:name="P1" style:family="paragraph" style:parent-style-name="Text_20_body" style:master-page-name="MP0">
      <style:paragraph-properties style:page-number="auto" fo:break-before="page"/>
    </style:style>
    <style:style style:name="P2" style:family="paragraph" style:parent-style-name="Table_20_Contents">
      <style:text-properties style:font-name="Liberation Sans" fo:font-size="11pt" style:font-size-asian="11pt"/>
    </style:style>
    <style:style style:name="P3" style:family="paragraph" style:parent-style-name="Table_20_Contents">
      <style:text-properties style:font-name="Liberation Sans" fo:font-size="11pt" officeooo:rsid="001a1d7c" officeooo:paragraph-rsid="001a1d7c" style:font-size-asian="11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hange Log Nummer:</text:span></text:span> ______ <text:s text:c="39"/></text:p>
      <text:p text:style-name="Text_20_body"/>
      <text:p text:style-name="Text_20_body"><text:span text:style-name="Default_20_Paragraph_20_Font"><text:span text:style-name="T1">Arbeitstitel:</text:span></text:span> Suraki</text:p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Text_20_body">Datum</text:p>
          </table:table-cell>
          <table:table-cell table:style-name="Tabelle1.A1" office:value-type="string">
            <text:p text:style-name="Text_20_body">Änderung<text:tab/></text:p>
          </table:table-cell>
          <table:table-cell table:style-name="Tabelle1.A1" office:value-type="string">
            <text:p text:style-name="Text_20_body"/>
          </table:table-cell>
          <table:table-cell table:style-name="Tabelle1.A1" office:value-type="string">
            <text:p text:style-name="Text_20_body">Grund für die Änderung</text:p>
          </table:table-cell>
          <table:table-cell table:style-name="Tabelle1.E1" office:value-type="string">
            <text:p text:style-name="Text_20_body"/>
          </table:table-cell>
        </table:table-row>
        <table:table-row table:style-name="Tabelle1.2">
          <table:table-cell table:style-name="Tabelle1.A1" office:value-type="string">
            <text:p text:style-name="P2">01.06.2026</text:p>
          </table:table-cell>
          <table:table-cell table:style-name="Tabelle1.A1" office:value-type="string">
            <text:p text:style-name="P2">Zeichnen und Ergänzen eines Beispielentwurfs des Hintergrunds</text:p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>Getting started...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/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>06.06.2026</text:p>
          </table:table-cell>
          <table:table-cell table:style-name="Tabelle1.A1" office:value-type="string">
            <text:p text:style-name="P2">Erstellen des Title Screens und Ingame-Menus</text:p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>Es wäre unschön zu Beginn des Spiels einfach in die Szene geworfen zu werden,</text:p>
            <text:p text:style-name="P2">der Spieler muss die Möglichkeit haben das Spiel aktiv zu starten <text:tab/>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/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>08.06.2026</text:p>
          </table:table-cell>
          <table:table-cell table:style-name="Tabelle1.A1" office:value-type="string">
            <text:p text:style-name="P2">Erstellen des Beispiel Puzzles (hardcoded, mock logik)</text:p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>Demonstrativer Prototyp</text:p>
            <text:p text:style-name="P2"/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/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>12.06.2026</text:p>
          </table:table-cell>
          <table:table-cell table:style-name="Tabelle1.A1" office:value-type="string">
            <text:p text:style-name="P2">Statemachine für Interactable Objects (Timeobjects) erstellt</text:p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>Reduziert Overhead für das Erstellen von Rätseln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/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>16.06.2026</text:p>
          </table:table-cell>
          <table:table-cell table:style-name="Tabelle1.A1" office:value-type="string">
            <text:p text:style-name="P2">Ergänzen erster Spieler-Monologe</text:p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>Um dem Spieler den Eintstieg in das Spiel zu erleichtern ist es hilfreich, wenn er zu Beginn etwas angeleitet wird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/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>18.06.2026</text:p>
          </table:table-cell>
          <table:table-cell table:style-name="Tabelle1.A1" office:value-type="string">
            <text:p text:style-name="P2">Abspeichern der Player-Settings</text:p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>Es ist lästig nach jedem Spielstart und in jedem Menu die Settings neu einzustellen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/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>01.07.2026</text:p>
          </table:table-cell>
          <table:table-cell table:style-name="Tabelle1.A1" office:value-type="string">
            <text:p text:style-name="P2">Parallaxe dynamisches Scrolling implementiert, <text:line-break/><text:line-break/><text:line-break/><text:line-break/><text:line-break/>Szenen Past und Present in der Main Szene verschoben, <text:line-break/><text:line-break/>Timetravel aus GameManager in Player-Skript verschoben, <text:line-break/>Sprites und Collider in Present und Past durch Polygone ersetzt</text:p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>Da wir ein durchgehendes handgemaltes Hintergrundbild haben, benötigten wir eine Möglichkeit, die Scroll-Geschwindigkeit dynamisch anzupassen, je nach dem an welcher Stelle im Spiel sich der Spiler befindet. <text:line-break/>Szenen überlappten einander und dies sorgte für Probleme bei Interaktion und Parallaxe, sie sind nun in Main an getrennten y-Koordinaten.<text:line-break/>Timetravel hört auf Player Input und gehört nicht zur UI, gehört daher in ein Skript, das zum Player gehört. <text:line-break/><text:line-break/>Polygone eignen sich besser für unseren Anwendungsfall.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/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>02.07.2026</text:p>
          </table:table-cell>
          <table:table-cell table:style-name="Tabelle1.A1" office:value-type="string">
            <text:p text:style-name="P2">GameOver- Overlay und grundsätzliche Logik</text:p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>Der Spieler muss in bestimmten Fällen verlieren können, sonst hätte es keinen Sinn die Rätsel zu lösen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/>
          </table:table-cell>
          <table:covered-table-cell/>
        </table:table-row>
        <text:soft-page-break/>
        <table:table-row table:style-name="Tabelle1.2">
          <table:table-cell table:style-name="Tabelle1.A1" office:value-type="string">
            <text:p text:style-name="P2">03.07.2026</text:p>
          </table:table-cell>
          <table:table-cell table:style-name="Tabelle1.A1" office:value-type="string">
            <text:p text:style-name="P2">Erster Entwurf der Itch-Seite</text:p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>Das Spiel muss auf Itch publiziert werden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/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>10.07.2026</text:p>
          </table:table-cell>
          <table:table-cell table:style-name="Tabelle1.A1" office:value-type="string">
            <text:p text:style-name="P2">Anpassung des GDD</text:p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>Die Spielbeschreibung im GDD unvollständig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/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>10.07.2026</text:p>
          </table:table-cell>
          <table:table-cell table:style-name="Tabelle1.A1" office:value-type="string">
            <text:p text:style-name="P2">Fokustest Feedback umgesetzt</text:p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>Bugs und fehlende Collider / Texturen / Koordinaten behoben. Logik für Zeitreise erweitert, sodass „Ziel“ Ort frei sein muss.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P3">10.07.2026</text:p>
          </table:table-cell>
          <table:table-cell table:style-name="Tabelle1.A1" office:value-type="string">
            <text:p text:style-name="P3">Bug fixes, added missing textures, improved itch page</text:p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3">Beheben verschiedener bugs, sperre der Spielersteuerung bei Tod, Anpassungen der itch seite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/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/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/>
          </table:table-cell>
          <table:covered-table-cell/>
        </table:table-row>
        <table:table-row table:style-name="Tabelle1.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table:number-columns-spanned="2" office:value-type="string">
            <text:p text:style-name="P2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Droid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Droid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.45cm" style:contextual-spacing="false"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size-asian="12pt" style:font-name-complex="Droid Sans" style:font-family-complex="'Droid Sans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 fo:hyphenation-keep="auto" loext:hyphenation-keep-type="column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ext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style:font-name="Liberation Sans" fo:font-family="'Liberation Sans'" style:font-family-generic="swiss" style:font-pitch="variable" fo:font-size="8pt" style:font-name-asian="Liberation Sans" style:font-family-asian="'Liberation Sans'" style:font-family-generic-asian="swiss" style:font-pitch-asian="variable" style:font-size-asian="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Footer">Game Engineering, Prof. Dr. Kai Eckert, Hochschule Mannheim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initial-creator>Kai Eckert</meta:initial-creator>
    <meta:creation-date>2024-04-09T22:29:00Z</meta:creation-date>
    <dc:date>2026-07-10T20:59:50.089758200</dc:date>
    <meta:print-date>2024-04-09T23:00:00Z</meta:print-date>
    <meta:editing-cycles>19</meta:editing-cycles>
    <meta:editing-duration>PT51M29S</meta:editing-duration>
    <meta:document-statistic meta:table-count="1" meta:image-count="0" meta:object-count="0" meta:page-count="2" meta:paragraph-count="43" meta:word-count="319" meta:character-count="2323" meta:non-whitespace-character-count="1993"/>
    <meta:template xlink:type="simple" xlink:actuate="onRequest" xlink:title="" xlink:href="Normal.dotm"/>
  </office:meta>
</office:document-meta>
</file>