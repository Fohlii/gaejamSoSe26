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17f3a7" officeooo:paragraph-rsid="0017f3a7"/>
    </style:style>
    <style:style style:name="P2" style:family="paragraph" style:parent-style-name="Text_20_body">
      <style:text-properties officeooo:paragraph-rsid="0017f3a7"/>
    </style:style>
    <style:style style:name="P3" style:family="paragraph" style:parent-style-name="Text_20_body">
      <style:text-properties officeooo:rsid="001831a0"/>
    </style:style>
    <style:style style:name="P4" style:family="paragraph" style:parent-style-name="Text_20_body">
      <style:text-properties officeooo:rsid="001831a0" officeooo:paragraph-rsid="001831a0"/>
    </style:style>
    <style:style style:name="P5" style:family="paragraph" style:parent-style-name="Text_20_body">
      <style:text-properties officeooo:rsid="001cc4fa" officeooo:paragraph-rsid="001cc4fa"/>
    </style:style>
    <style:style style:name="T1" style:family="text">
      <style:text-properties officeooo:rsid="0017f3a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7f3a7" style:font-weight-asian="bold" style:font-weight-complex="bold"/>
    </style:style>
    <style:style style:name="T4" style:family="text">
      <style:text-properties fo:font-weight="bold" officeooo:rsid="001c2693" style:font-weight-asian="bold" style:font-weight-complex="bold"/>
    </style:style>
    <style:style style:name="T5" style:family="text">
      <style:text-properties officeooo:rsid="0019f733"/>
    </style:style>
    <style:style style:name="T6" style:family="text">
      <style:text-properties officeooo:rsid="001cc4fa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T4">Change Log</text:span><text:span text:style-name="T2"> </text:span><text:span text:style-name="T3">Nummer:</text:span><text:span text:style-name="T1"> ______ <text:s text:c="39"/></text:span></text:p>
      <text:p text:style-name="P2"/>
      <text:p text:style-name="P2"><text:span text:style-name="T2">Arbeitstitel</text:span><text:span text:style-name="T3">:</text:span><text:span text:style-name="T1"> ______________________________________</text:span><text:span text:style-name="T5">_______</text:span><text:span text:style-name="T1">___________________</text:span></text:p>
      <text:p text:style-name="P2"/>
      <text:p text:style-name="P5">Datum<text:tab/><text:tab/> <text:s text:c="2"/>Design-Änderung<text:tab/><text:tab/><text:tab/> <text:s text:c="3"/>Grund für die Änderung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Droid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Droid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1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  <style:text-properties style:font-name="Liberation Sans1" fo:font-family="'Liberation Sans'" style:font-style-name="Standard" style:font-family-generic="swiss" style:font-pitch="variable" fo:font-size="11pt"/>
    </style:style>
    <style:style style:name="List" style:family="paragraph" style:parent-style-name="Text_20_body" style:class="list">
      <style:text-properties style:font-size-asian="12pt" style:font-name-complex="Droid Sans" style:font-family-complex="'Droid San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Droid Sans" style:font-family-complex="'Droid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" style:font-family-complex="'Droid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0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2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4.5mm" style:contextual-spacing="false"/>
      <style:text-properties fo:font-size="18pt" fo:font-weight="bold" style:font-size-asian="18pt" style:font-weight-asian="bold" style:font-size-complex="18pt" style:font-weight-complex="600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4pt" fo:font-weight="bold" style:font-size-asian="16pt" style:font-weight-asian="bold" style:font-size-complex="16pt" style:font-weight-complex="60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.02mm" style:type="center"/>
          <style:tab-stop style:position="170.06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.02mm" style:type="center"/>
          <style:tab-stop style:position="170.06mm" style:type="right"/>
        </style:tab-stops>
      </style:paragraph-properties>
      <style:text-properties style:font-name="Liberation Sans1" fo:font-family="'Liberation Sans'" style:font-style-name="Standard" style:font-family-generic="swiss" style:font-pitch="variable" fo:font-size="8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draw:fill="none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017f3a7" officeooo:paragraph-rsid="0017f3a7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bottom="4.99mm" fo:background-color="transparent" draw:fill="none"/>
      </style:header-style>
      <style:footer-style>
        <style:header-footer-properties fo:min-height="6mm" fo:margin-left="0mm" fo:margin-right="0mm" fo:margin-top="4.99m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MP1">Game Engineering, Prof. Dr. Kai Eckert, Hochschule Mannheim</text:p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ai Eckert</meta:initial-creator>
    <meta:creation-date>2024-04-09T22:29:02.066922845</meta:creation-date>
    <dc:date>2024-04-09T23:04:41.247948661</dc:date>
    <dc:creator>Kai Eckert</dc:creator>
    <meta:editing-duration>PT13M26S</meta:editing-duration>
    <meta:editing-cycles>4</meta:editing-cycles>
    <meta:generator>LibreOffice/24.2.2.2$Linux_X86_64 LibreOffice_project/420$Build-2</meta:generator>
    <meta:print-date>2024-04-09T23:00:27.868576400</meta:print-date>
    <meta:printed-by>PDF-Dateien: Kai Eckert</meta:printed-by>
    <meta:document-statistic meta:table-count="0" meta:image-count="0" meta:object-count="0" meta:page-count="1" meta:paragraph-count="4" meta:word-count="20" meta:character-count="256" meta:non-whitespace-character-count="190"/>
  </office:meta>
</office:document-meta>
</file>