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edc55"/>
    </style:style>
    <style:style style:name="P2" style:family="paragraph" style:parent-style-name="Text_20_body">
      <style:text-properties officeooo:rsid="001df962" officeooo:paragraph-rsid="001df962"/>
    </style:style>
    <style:style style:name="P3" style:family="paragraph" style:parent-style-name="Text_20_body">
      <style:text-properties officeooo:paragraph-rsid="0017f3a7"/>
    </style:style>
    <style:style style:name="P4" style:family="paragraph" style:parent-style-name="Heading_20_2">
      <style:text-properties officeooo:rsid="001df962" officeooo:paragraph-rsid="001df962"/>
    </style:style>
    <style:style style:name="P5" style:family="paragraph" style:parent-style-name="Text_20_body">
      <style:text-properties officeooo:rsid="001edc55" officeooo:paragraph-rsid="001edc55"/>
    </style:style>
    <style:style style:name="P6" style:family="paragraph" style:parent-style-name="Text_20_body">
      <style:text-properties officeooo:rsid="001f8609" officeooo:paragraph-rsid="001f8609"/>
    </style:style>
    <style:style style:name="T1" style:family="text">
      <style:text-properties fo:font-weight="bold" officeooo:rsid="001df962"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7f3a7" style:font-weight-asian="bold" style:font-weight-complex="bold"/>
    </style:style>
    <style:style style:name="T4" style:family="text">
      <style:text-properties officeooo:rsid="0017f3a7"/>
    </style:style>
    <style:style style:name="T5" style:family="text">
      <style:text-properties fo:font-weight="bold" officeooo:rsid="001edc55" style:font-weight-asian="bold" style:font-weight-complex="bold"/>
    </style:style>
    <style:style style:name="T6" style:family="text">
      <style:text-properties officeooo:rsid="001edc55"/>
    </style:style>
    <style:style style:name="T7" style:family="text">
      <style:text-properties officeooo:rsid="001831a0"/>
    </style:style>
    <style:style style:name="T8" style:family="text">
      <style:text-properties officeooo:rsid="001f8609"/>
    </style:style>
    <style:style style:name="T9" style:family="text">
      <style:text-properties officeooo:rsid="001fa9f5"/>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okus Test</text:span><text:span text:style-name="T2"> </text:span><text:span text:style-name="T3">Nummer:</text:span><text:span text:style-name="T4"> 3 <text:s text:c="32"/></text:span><text:span text:style-name="T3">Datum: </text:span><text:span text:style-name="T5">10.07</text:span></text:p>
      <text:p text:style-name="P2"><text:span text:style-name="T2">Version:</text:span> Version vom 10.07</text:p>
      <text:p text:style-name="P3"><text:span text:style-name="T2">Arbeitstitel</text:span><text:span text:style-name="T3">:</text:span><text:span text:style-name="T4"> </text:span><text:span text:style-name="T6">Fokustest</text:span></text:p>
      <text:h text:style-name="P4" text:outline-level="2" text:is-list-header="true">Ziel des Tests</text:h>
      <text:p text:style-name="Text_20_body"><text:span text:style-name="T7">Aufzeigen von Problem</text:span><text:span text:style-name="T8">a</text:span><text:span text:style-name="T7">tiken im aktuellen Spiel</text:span></text:p>
      <text:h text:style-name="P4" text:outline-level="2" text:is-list-header="true">Zur Verfügung gestellte Materialen (Versionieren!)</text:h>
      <text:p text:style-name="P5">Spiel und Website auf itch</text:p>
      <text:h text:style-name="P4" text:outline-level="2" text:is-list-header="true">Charakteristik der Testperson (Zielgruppe? Alter? Erfahrung?)</text:h>
      <text:p text:style-name="P5">23 Jahre, Casual gamer</text:p>
      <text:h text:style-name="P4" text:outline-level="2" text:is-list-header="true">Beobachtungen beim Spielen</text:h>
      <text:p text:style-name="P5">Der Spieler fühlte sich durch zu lange bzw. zu viele Textblöcke gestört. Die Wege zwischen den Interaktionspunkten waren zu weit, die notwendigen Interaktionen nicht klar ersichtlich. Es wäre wünschenswert die Tastenbelegung und Ineraktionsmöglichkeit im Spiel visuell ersichtlich zu machen. Außerdem sind die Übergänge zwischen den einzelnen Hintergrundbildern zu abrupt. Fernerhin ist der Untergrund nicht ausreichend zu sehen. Der Spieler kann nicht klar erkennen was ihm auf dem Boden als nächstes begegnen wird. <text:span text:style-name="T9">Die Zeitreise nach restart des Spiels nach dem Sterben des Spielers ist verbuggt.</text:span></text:p>
      <text:h text:style-name="Heading_20_2" text:outline-level="2"><text:span text:style-name="T8">Erke</text:span>ntnisse</text:h>
      <text:p text:style-name="P6">Die Abstände/ Wege zwischen den Rätseln müssen verkürtzt, die Monologe kürzer und überspringbar und Interaktionsmöglichkeiten im Spiel klar erkennbar gemacht werd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Standard" style:font-family-generic="swiss" style:font-pitch="variable" fo:font-size="11pt" officeooo:rsid="001df962"/>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2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45cm" style:contextual-spacing="false"/>
      <style:text-properties fo:font-size="18pt" fo:font-weight="bold" style:font-size-asian="18pt" style:font-weight-asian="bold" style:font-size-complex="18pt" style:font-weight-complex="600"/>
    </style:style>
    <style:style style:name="Frame_20_contents" style:display-name="Frame contents" style:family="paragraph" style:parent-style-name="Standard"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text-properties style:font-name="Liberation Sans1" fo:font-family="'Liberation Sans'" style:font-style-name="Standard" style:font-family-generic="swiss" style:font-pitch="variable" fo:font-size="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7f3a7" officeooo:paragraph-rsid="0017f3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me Engineering, Prof. Dr. Kai Eckert, Hochschule Mannheim</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Kai Eckert</meta:initial-creator>
    <meta:creation-date>2024-04-09T22:29:02.066922845</meta:creation-date>
    <dc:date>2026-07-10T11:54:00.387189400</dc:date>
    <meta:editing-duration>PT48M11S</meta:editing-duration>
    <meta:editing-cycles>6</meta:editing-cycles>
    <meta:generator>LibreOffice/25.2.7.2$Windows_X86_64 LibreOffice_project/5cbfd1ab6520636bb5f7b99185aa69bd7456825d</meta:generator>
    <meta:document-statistic meta:table-count="0" meta:image-count="0" meta:object-count="0" meta:page-count="1" meta:paragraph-count="14" meta:word-count="159" meta:character-count="1192" meta:non-whitespace-character-count="1015"/>
  </office:meta>
</office:document-meta>
</file>