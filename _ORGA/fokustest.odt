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Normal">
      <style:paragraph-properties fo:break-before="page"/>
    </style:style>
    <style:style style:name="P3" style:family="paragraph" style:parent-style-name="Text_20_body">
      <style:text-properties officeooo:paragraph-rsid="000b105f"/>
    </style:style>
    <style:style style:name="T1" style:family="text">
      <style:text-properties fo:font-weight="bold" style:font-weight-asian="bold" style:font-weight-complex="bold"/>
    </style:style>
    <style:style style:name="T2" style:family="text">
      <style:text-properties officeooo:rsid="00094bdc"/>
    </style:style>
    <style:style style:name="T3" style:family="text">
      <style:text-properties officeooo:rsid="000a70b7"/>
    </style:style>
    <style:style style:name="T4" style:family="text">
      <style:text-properties officeooo:rsid="000b10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Fokus Test Nummer:</text:span></text:span> 1 <text:s text:c="40"/><text:span text:style-name="Default_20_Paragraph_20_Font"><text:span text:style-name="T1">Datum: </text:span></text:span>08.07.2026</text:p>
      <text:p text:style-name="Text_20_body"><text:span text:style-name="Default_20_Paragraph_20_Font"><text:span text:style-name="T1">Version:</text:span></text:span> ~Github commit 39efc49</text:p>
      <text:p text:style-name="Text_20_body"><text:span text:style-name="Default_20_Paragraph_20_Font"><text:span text:style-name="T1">Arbeitstitel:</text:span></text:span> Suraki</text:p>
      <text:h text:style-name="Heading_20_2" text:outline-level="2">Ziel des Tests</text:h>
      <text:p text:style-name="Text_20_body">Spieldauer abschätzen und Schwierigkeit ggf. anpassen. Feedback einholen bzgl. Frustrationsquellen und fehlleitende Implementierungen korrigieren.</text:p>
      <text:p text:style-name="Text_20_body"/>
      <text:h text:style-name="Heading_20_2" text:outline-level="2">Zur Verfügung gestellte Materialen</text:h>
      <text:p text:style-name="Text_20_body">Itch.io Seite und mündliche Erläuterung zu Genre und Tastenbelegung.</text:p>
      <text:p text:style-name="Text_20_body"/>
      <text:h text:style-name="Heading_20_2" text:outline-level="2">Charakteristik der Testperson</text:h>
      <text:p text:style-name="Text_20_body">Zielgruppe – ja, spielt in eigener Freizeit häufig und gerne Rätselspiele</text:p>
      <text:p text:style-name="Text_20_body">Alter: 29</text:p>
      <text:p text:style-name="Text_20_body">Erfahrung: erfahren</text:p>
      <text:p text:style-name="Text_20_body">Frustration: ausdauernd (nach eigener Angabe)</text:p>
      <text:p text:style-name="Text_20_body"/>
      <text:h text:style-name="Heading_20_2" text:outline-level="2">Beobachtungen beim Spielen</text:h>
      <text:p text:style-name="Text_20_body">-Spieler berührt Wasser kurz, beendet den Dialog nicht sofort, stirbt später, ist verblüfft</text:p>
      <text:p text:style-name="Text_20_body">-(Bug) Spieler teleportierte sich inkorrekt unter bestimmten Bedingungen (reproduzierbar)</text:p>
      <text:p text:style-name="Text_20_body">-Spieler äußert sich genervt über den Start-Dialog, der bei wiederholtem Sterben wiederholt abgespielt wird und nicht von alleine verschwindet.</text:p>
      <text:p text:style-name="Text_20_body">-Spieler wundert sich, dass Leuchtturm nicht den Weg blockiert aber dass kleine Brücke begehbar ist</text:p>
      <text:p text:style-name="Text_20_body">-(planned Feature) Spieler ist unsicher, ob augenscheinlich aufgesammelter Gegenstand im „Inventar“ sei oder nicht</text:p>
      <text:p text:style-name="Text_20_body">-(missing Feature) P2 Hindernis war nicht instantiiert</text:p>
      <text:p text:style-name="Text_20_body">-Spieler antizipiert mögliche Rätsel-Lösung ohne explizite Hinweise</text:p>
      <text:p text:style-name="Text_20_body">-Spieler kommentiert, dass das Platformer-Element zu erbarmungslos sei (kleine bzw. unklare Zeitfenster)</text:p>
      <text:p text:style-name="Text_20_body">-(missing Texture) Spieler war zögerlich auf dem großen Baum, da die begehbare Oberfläche nicht mit der sichtbaren Oberfläche übereinstimmte</text:p>
      <text:p text:style-name="Text_20_body">-Spieler war gelangweilt beim Klettern, da zu langsam. Auch das Fehlen von links/rechts Bewegung auf der Leiter hat zu Frustration geführt.</text:p>
      <text:p text:style-name="Text_20_body">-Fleck wo S<text:span text:style-name="T2">e</text:span>tzling gepflanzt werden sollte war unklar / zu klein</text:p>
      <text:p text:style-name="Text_20_body"><text:soft-page-break/>-Spieler erwartete Feedback für nicht-mögliche Aktionen zB versuchtes Fällen des massiven Baumes</text:p>
      <text:p text:style-name="Text_20_body"/>
      <text:p text:style-name="Text_20_body">-Spieldauer ~10 min</text:p>
      <text:p text:style-name="Text_20_body"/>
      <text:h text:style-name="Heading_20_2" text:outline-level="2">Erkenntnisse</text:h>
      <text:p text:style-name="Text_20_body">-Spieler muss bewegungsunfähig gemacht werden, während der zum Tod führende Dialog durchläuft.</text:p>
      <text:p text:style-name="Text_20_body">-Start-Dialog soll nur bei Start abgespielt werden, bei Neustart ggf. etwas kurzes (1 Klick).</text:p>
      <text:p text:style-name="Text_20_body">-Eventuell 2.5D Elemente hinzufügen zu Boden oder Brücke, damit klarer wird, welche Objekte sich wo hinsichtlich 2D-Tiefen-Ebene befinden.</text:p>
      <text:p text:style-name="Text_20_body">-Inventar Priorität erhöht.</text:p>
      <text:p text:style-name="Text_20_body">-Puzzle 2 Hindernis hatte noch nicht die korrekten Koordinaten für manche interagierbaren Objekte.</text:p>
      <text:p text:style-name="Text_20_body">-Eventuell Dialoge mit offensichtlichen Hinweisen reduzieren.</text:p>
      <text:p text:style-name="Text_20_body">-Platformen außerhalb von expliziten Platforming-Hindernissen großzügiger auslegen und bei solchen Hindernissen die sichtbare Platform mit der tatsächlichen genau übereinstimmen.</text:p>
      <text:p text:style-name="Text_20_body">-Klettergeschwindigkeit erhöht, links/rechts Bewegung auf der Leiter in Erwägung gezogen.</text:p>
      <text:p text:style-name="Text_20_body">-S<text:span text:style-name="T3">e</text:span>tzling Pflanz Fleck benötigt sichtbare, aber nicht zu offensichtliche Textur.</text:p>
      <text:p text:style-name="Text_20_body">-Tastendruck für highlighting von interagierbaren Objekten in Erwägung gezogen.</text:p>
      <text:p text:style-name="P2"/>
      <text:p text:style-name="Text_20_body"><text:span text:style-name="Default_20_Paragraph_20_Font"><text:span text:style-name="T1">Fokus Test Nummer:</text:span></text:span> 2 <text:s text:c="40"/><text:span text:style-name="Default_20_Paragraph_20_Font"><text:span text:style-name="T1">Datum: </text:span></text:span>08.07.2026</text:p>
      <text:p text:style-name="Text_20_body"><text:span text:style-name="Default_20_Paragraph_20_Font"><text:span text:style-name="T1">Version:</text:span></text:span> ~Github commit 39efc49</text:p>
      <text:p text:style-name="Text_20_body"><text:span text:style-name="Default_20_Paragraph_20_Font"><text:span text:style-name="T1">Arbeitstitel:</text:span></text:span> Suraki</text:p>
      <text:h text:style-name="Heading_20_2" text:outline-level="2">Ziel des Tests</text:h>
      <text:p text:style-name="Text_20_body">Spieldauer abschätzen und Schwierigkeit ggf. anpassen. Feedback einholen bzgl. Frustrationsquellen und fehlleitende Implementierungen korrigieren.</text:p>
      <text:p text:style-name="Text_20_body"/>
      <text:h text:style-name="Heading_20_2" text:outline-level="2">Zur Verfügung gestellte Materialen</text:h>
      <text:p text:style-name="Text_20_body">Itch.io Seite und mündliche Erläuterung zu Genre und Tastenbelegung.</text:p>
      <text:p text:style-name="Text_20_body"/>
      <text:h text:style-name="Heading_20_2" text:outline-level="2">Charakteristik der Testperson</text:h>
      <text:p text:style-name="Text_20_body">Zielgruppe – ja, spielt in eigener Freizeit gelegentlich und auch Rätselspiele</text:p>
      <text:p text:style-name="Text_20_body">Alter: 22</text:p>
      <text:p text:style-name="Text_20_body">Erfahrung: erfahren</text:p>
      <text:p text:style-name="Text_20_body">Frustration: ausdauernd (nach eigener Angabe)</text:p>
      <text:p text:style-name="Text_20_body"/>
      <text:h text:style-name="Heading_20_2" text:outline-level="2">Beobachtungen beim Spielen</text:h>
      <text:p text:style-name="Text_20_body">-(Bug) Spieler teleportierte sich inkorrekt unter bestimmten Bedingungen (reproduzierbar)</text:p>
      <text:p text:style-name="Text_20_body">-(planned Feature) Spieler unsicher ob Axt nach Nutzen noch in Besitz sei</text:p>
      <text:p text:style-name="Text_20_body">-Spieler versucht vergeblich, S<text:span text:style-name="T4">e</text:span>tzling mit Axt zu fällen</text:p>
      <text:p text:style-name="Text_20_body">-(planned Feature) Spieler kann Inventarbegrenzung (1 Slot) nicht implizit nachvollziehen</text:p>
      <text:p text:style-name="Text_20_body">-P2 Baum ist mit P1 Baum verwechselbar</text:p>
      <text:p text:style-name="Text_20_body">-(planned Feature) Zeitreise in solide Objekte (zB Berg) provoziert unvorhergesehen Resultate</text:p>
      <text:p text:style-name="Text_20_body">-Spieler kann Tod für immer aufhalten indem Dialog nicht beendet wird</text:p>
      <text:p text:style-name="Text_20_body">-(missing Collider) Brückenrumpf ist überraschend nicht kollidierend</text:p>
      <text:p text:style-name="Text_20_body">-(missing Textures) Unklarheit, was Hintergrund sei</text:p>
      <text:p text:style-name="Text_20_body">-Unklarheit, was interagierbar sei</text:p>
      <text:p text:style-name="Text_20_body">-Unklarheit über Inventar</text:p>
      <text:p text:style-name="Text_20_body">-Ziel (Auf Leuchtturm gelangen) unklar</text:p>
      <text:p text:style-name="Text_20_body"/>
      <text:p text:style-name="Text_20_body">-Spieldauer ~19 min</text:p>
      <text:p text:style-name="Text_20_body"><text:soft-page-break/>-Speedrun: &lt;1 min durch Ausnutzen von Teleportations-Bug und nicht-Beenden des Todes-Dialogs.</text:p>
      <text:p text:style-name="Text_20_body"/>
      <text:h text:style-name="Heading_20_2" text:outline-level="2">Erkenntnisse</text:h>
      <text:p text:style-name="Text_20_body">-Inventar Priorität erhöht.</text:p>
      <text:p text:style-name="Text_20_body">-P2 Baum verschieben</text:p>
      <text:p text:style-name="Text_20_body">-Für Zeitreise nur gültige Zielorte erlauben geplant</text:p>
      <text:p text:style-name="Text_20_body">-Spieler muss bewegungsunfähig gemacht werden, während der zum Tod führende Dialog durchläuft.</text:p>
      <text:p text:style-name="Text_20_body">-Eventuell 2.5D Elemente hinzufügen zu Boden oder Brücke, damit klarer wird, welche Objekte sich wo hinsichtlich 2D-Tiefen-Ebene befinden.</text:p>
      <text:p text:style-name="Text_20_body">-Tastendruck für highlighting von interagierbaren Objekten in Erwägung gezogen.</text:p>
      <text:p text:style-name="Text_20_body">-Dialog einbauen, der Ziel (auf Leuchtturm gelangen) nahelegt.</text:p>
      <text:p text:style-name="P2"/>
      <text:p text:style-name="Text_20_body"><text:span text:style-name="Default_20_Paragraph_20_Font"><text:span text:style-name="T1">Fokus Test Nummer:</text:span></text:span> 3 <text:s text:c="32"/><text:span text:style-name="Default_20_Paragraph_20_Font"><text:span text:style-name="T1">Datum: 10.07</text:span></text:span></text:p>
      <text:p text:style-name="P3"><text:span text:style-name="Default_20_Paragraph_20_Font"><text:span text:style-name="T1">Version:</text:span></text:span> <text:span text:style-name="T4">Github commit <text:s/>39efc49</text:span></text:p>
      <text:p text:style-name="Text_20_body"><text:span text:style-name="Default_20_Paragraph_20_Font"><text:span text:style-name="T1">Arbeitstitel:</text:span></text:span> Fokustest</text:p>
      <text:h text:style-name="Heading_20_2" text:outline-level="2">Ziel des Tests</text:h>
      <text:p text:style-name="Text_20_body">Aufzeigen von Problematiken im aktuellen Spiel</text:p>
      <text:h text:style-name="Heading_20_2" text:outline-level="2">Zur Verfügung gestellte Materialen (Versionieren!)</text:h>
      <text:p text:style-name="Text_20_body">Spiel und Website auf itch</text:p>
      <text:h text:style-name="Heading_20_2" text:outline-level="2">Charakteristik der Testperson (Zielgruppe? Alter? Erfahrung?)</text:h>
      <text:p text:style-name="Text_20_body">23 Jahre, Casual gamer</text:p>
      <text:h text:style-name="Heading_20_2" text:outline-level="2">Beobachtungen beim Spielen</text:h>
      <text:p text:style-name="Text_20_body">Der Spieler fühlte sich durch zu lange bzw. zu viele Textblöcke gestört. Die Wege zwischen den Interaktionspunkten waren zu weit, die notwendigen Interaktionen nicht klar ersichtlich. Es wäre wünschenswert die Tastenbelegung und Ineraktionsmöglichkeit im Spiel visuell ersichtlich zu machen. Außerdem sind die Übergänge zwischen den einzelnen Hintergrundbildern zu abrupt. Fernerhin ist der Untergrund nicht ausreichend zu sehen. Der Spieler kann nicht klar erkennen was ihm auf dem Boden als nächstes begegnen wird. Die Zeitreise nach restart des Spiels nach dem Sterben des Spielers ist verbuggt.</text:p>
      <text:h text:style-name="Heading_20_2" text:outline-level="2">Erkentnisse</text:h>
      <text:p text:style-name="Text_20_body">Die Abstände/ Wege zwischen den Rätseln müssen verkürtzt, die Monologe kürzer und überspringbar und Interaktionsmöglichkeiten im Spiel klar erkennbar gemacht werd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erif CJK SC" style:font-size-asian="12pt" style:language-asian="zh" style:country-asian="CN" style:font-style-asian="normal" style:font-weight-asian="normal" style:font-name-complex="Droid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Droid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style:font-name="Liberation Sans" fo:font-family="'Liberation Sans'" style:font-family-generic="swiss" style:font-pitch="variable" fo:font-size="11pt" style:font-name-asian="Liberation Sans" style:font-family-asian="'Liberation Sans'" style:font-family-generic-asian="swiss" style:font-pitch-asian="variable" style:font-size-asian="11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cm" fo:margin-bottom="0.45cm" style:contextual-spacing="false"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style:font-name-complex="Droid Sans" style:font-family-complex="'Droid Sans'"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02cm" style:type="center"/>
          <style:tab-stop style:position="17.006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style:font-name="Liberation Sans" fo:font-family="'Liberation Sans'" style:font-family-generic="swiss" style:font-pitch="variable" fo:font-size="8pt" style:font-name-asian="Liberation Sans" style:font-family-asian="'Liberation Sans'" style:font-family-generic-asian="swiss" style:font-pitch-asian="variable" style:font-size-asian="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Noto Sans CJK SC" style:font-family-asian="'Noto Sans CJK SC'" style:font-family-generic-asian="system" style:font-pitch-asian="variable" style:font-size-asian="16pt" style:font-weight-asian="bold" style:font-size-complex="16pt"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Footer">Game Engineering, Prof. Dr. Kai Eckert, Hochschule Mannheim</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Kai Eckert</meta:initial-creator>
    <meta:creation-date>2024-04-09T22:29:00Z</meta:creation-date>
    <dc:date>2026-07-10T14:55:32.553204600</dc:date>
    <meta:editing-cycles>10</meta:editing-cycles>
    <meta:editing-duration>PT53M34S</meta:editing-duration>
    <meta:document-statistic meta:table-count="0" meta:image-count="0" meta:object-count="0" meta:page-count="5" meta:paragraph-count="86" meta:word-count="738" meta:character-count="5873" meta:non-whitespace-character-count="5106"/>
    <meta:template xlink:type="simple" xlink:actuate="onRequest" xlink:title="" xlink:href="Normal.dotm"/>
  </office:meta>
</office:document-meta>
</file>