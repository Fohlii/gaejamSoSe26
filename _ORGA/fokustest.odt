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f3a7" officeooo:paragraph-rsid="0017f3a7"/>
    </style:style>
    <style:style style:name="P2" style:family="paragraph" style:parent-style-name="Text_20_body">
      <style:text-properties officeooo:paragraph-rsid="0017f3a7"/>
    </style:style>
    <style:style style:name="P3" style:family="paragraph" style:parent-style-name="Text_20_body">
      <style:text-properties officeooo:rsid="001831a0"/>
    </style:style>
    <style:style style:name="P4" style:family="paragraph" style:parent-style-name="Heading_20_2">
      <style:text-properties officeooo:rsid="001df962" officeooo:paragraph-rsid="001df962"/>
    </style:style>
    <style:style style:name="P5" style:family="paragraph" style:parent-style-name="Heading_20_2">
      <style:text-properties officeooo:paragraph-rsid="001df962"/>
    </style:style>
    <style:style style:name="P6" style:family="paragraph" style:parent-style-name="Text_20_body">
      <style:text-properties officeooo:rsid="001df962" officeooo:paragraph-rsid="001df962"/>
    </style:style>
    <style:style style:name="P7" style:family="paragraph" style:parent-style-name="Text_20_body">
      <style:text-properties officeooo:paragraph-rsid="001df962"/>
    </style:style>
    <style:style style:name="T1" style:family="text">
      <style:text-properties officeooo:rsid="0017f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3a7" style:font-weight-asian="bold" style:font-weight-complex="bold"/>
    </style:style>
    <style:style style:name="T4" style:family="text">
      <style:text-properties fo:font-weight="bold" officeooo:rsid="001df962" style:font-weight-asian="bold" style:font-weight-complex="bold"/>
    </style:style>
    <style:style style:name="T5" style:family="text">
      <style:text-properties officeooo:rsid="0019f733"/>
    </style:style>
    <style:style style:name="T6" style:family="text">
      <style:text-properties officeooo:rsid="001df962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4">Fokus Test</text:span><text:span text:style-name="T2"> </text:span><text:span text:style-name="T3">Nummer:</text:span><text:span text:style-name="T1"> ______ <text:s text:c="40"/></text:span><text:span text:style-name="T3">Datum: </text:span><text:span text:style-name="T1">_____________________</text:span></text:p>
      <text:p text:style-name="P6"><text:span text:style-name="T2">Version:</text:span> _____________________________</text:p>
      <text:p text:style-name="P2"><text:span text:style-name="T2">Arbeitstitel</text:span><text:span text:style-name="T3">:</text:span><text:span text:style-name="T1"> __________________________________________</text:span><text:span text:style-name="T5">_______</text:span><text:span text:style-name="T1">___________________</text:span></text:p>
      <text:h text:style-name="P4" text:outline-level="2" text:is-list-header="true">Ziel des Tests</text:h>
      <text:p text:style-name="P3"/>
      <text:p text:style-name="P3"/>
      <text:p text:style-name="Text_20_body"/>
      <text:h text:style-name="P5" text:outline-level="2" text:is-list-header="true"><text:span text:style-name="T6">Zur Verfügung gestellte Materialen (Versionieren!)</text:span></text:h>
      <text:p text:style-name="Text_20_body"/>
      <text:h text:style-name="P5" text:outline-level="2" text:is-list-header="true"><text:span text:style-name="T6">Charakteristik der Testperson (Zielgruppe? Alter? Erfahrung?)</text:span></text:h>
      <text:p text:style-name="P7"/>
      <text:h text:style-name="P5" text:outline-level="2" text:is-list-header="true"><text:span text:style-name="T6">Beobachtungen beim Spielen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Erkenntnisse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Liberation Sans1" fo:font-family="'Liberation Sans'" style:font-style-name="Standard" style:font-family-generic="swiss" style:font-pitch="variable" fo:font-size="11pt" officeooo:rsid="001df962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4.5mm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style:font-name="Liberation Sans1" fo:font-family="'Liberation Sans'" style:font-style-name="Standard" style:font-family-generic="swiss" style:font-pitch="variable" fo:font-size="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7f3a7" officeooo:paragraph-rsid="0017f3a7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me Engineering, Prof. Dr. Kai Eckert, Hochschule Mannheim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i Eckert</meta:initial-creator>
    <meta:creation-date>2024-04-09T22:29:02.066922845</meta:creation-date>
    <dc:date>2024-04-09T23:11:58.136313766</dc:date>
    <dc:creator>Kai Eckert</dc:creator>
    <meta:editing-duration>PT10M18S</meta:editing-duration>
    <meta:editing-cycles>3</meta:editing-cycles>
    <meta:generator>LibreOffice/24.2.2.2$Linux_X86_64 LibreOffice_project/420$Build-2</meta:generator>
    <meta:document-statistic meta:table-count="0" meta:image-count="0" meta:object-count="0" meta:page-count="1" meta:paragraph-count="9" meta:word-count="36" meta:character-count="436" meta:non-whitespace-character-count="369"/>
  </office:meta>
</office:document-meta>
</file>